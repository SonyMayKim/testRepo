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1b37" officeooo:paragraph-rsid="001d1b37"/>
    </style:style>
    <style:style style:name="P2" style:family="paragraph" style:parent-style-name="Text_20_body">
      <style:text-properties officeooo:rsid="001d1b37" officeooo:paragraph-rsid="001d1b37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reat question — the <text:span text:style-name="Strong_20_Emphasis">core DevOps path stays the same</text:span>, but <text:span text:style-name="Strong_20_Emphasis">tools, expectations, and hiring signals changed by 2026</text:span>.<text:line-break/>Below is an <text:span text:style-name="Strong_20_Emphasis">updated 2026-ready roadmap</text:span> that reflects <text:span text:style-name="Strong_20_Emphasis">current industry practice, hiring trends, and tooling</text:span>.</text:p>
      <text:p text:style-name="Text_20_body">This still takes you from <text:span text:style-name="Strong_20_Emphasis">zero IT → confident Junior DevOps with a strong portfolio</text:span>.</text:p>
      <text:p text:style-name="Horizontal_20_Line"/>
      <text:h text:style-name="Heading_20_1" text:outline-level="1">🧭 DevOps Roadmap (2026 Edition)</text:h>
      <text:p text:style-name="Text_20_body"><text:span text:style-name="Strong_20_Emphasis">Zero IT → Junior DevOps (Job-Ready)</text:span></text:p>
      <text:p text:style-name="Text_20_body">⏱ <text:span text:style-name="Strong_20_Emphasis">Timeline:</text:span> 8–12 months<text:line-break/>🎯 <text:span text:style-name="Strong_20_Emphasis">Target role:</text:span> Junior DevOps / Cloud Engineer / Platform Engineer (entry)</text:p>
      <text:p text:style-name="Horizontal_20_Line"/>
      <text:h text:style-name="Heading_20_2" text:outline-level="2">🔁 What Changed by 2026 (Important)</text:h>
      <text:p text:style-name="Text_20_body">Before the plan, here’s what’s different now:</text:p>
      <text:p text:style-name="Text_20_body">✅ <text:span text:style-name="Strong_20_Emphasis">Terraform license change → OpenTofu is first-class</text:span><text:line-break/>✅ <text:span text:style-name="Strong_20_Emphasis">Platform Engineering mindset is expected</text:span><text:line-break/>✅ <text:span text:style-name="Strong_20_Emphasis">GitHub Actions &amp; GitLab CI dominate</text:span><text:line-break/>✅ <text:span text:style-name="Strong_20_Emphasis">Security is shift-left (DevSecOps)</text:span><text:line-break/>✅ <text:span text:style-name="Strong_20_Emphasis">Kubernetes is mandatory knowledge</text:span><text:line-break/>✅ <text:span text:style-name="Strong_20_Emphasis">Cloud cost awareness is expected</text:span><text:line-break/>✅ <text:span text:style-name="Strong_20_Emphasis">AI-assisted ops exists, but fundamentals matter more</text:span></text:p>
      <text:p text:style-name="Text_20_body">This plan reflects all of that.</text:p>
      <text:p text:style-name="Horizontal_20_Line"/>
      <text:h text:style-name="Heading_20_1" text:outline-level="1">PHASE 0 — IT &amp; Linux Fundamentals (Month 1)</text:h>
      <text:p text:style-name="Text_20_body"><text:span text:style-name="Strong_20_Emphasis">Goal:</text:span> Think like an engineer, not just run commands.</text:p>
      <text:h text:style-name="Heading_20_3" text:outline-level="3">Learn</text:h>
      <text:list text:style-name="L1">
        <text:list-item>
          <text:p text:style-name="P3">What DevOps &amp; Platform Engineering are (2026 view)</text:p>
        </text:list-item>
        <text:list-item>
          <text:p text:style-name="P3">Linux fundamentals (non-negotiable)</text:p>
        </text:list-item>
        <text:list-item>
          <text:p text:style-name="P3">Processes, memory, permissions</text:p>
        </text:list-item>
        <text:list-item>
          <text:p text:style-name="P3">SSH, package managers</text:p>
        </text:list-item>
        <text:list-item>
          <text:p text:style-name="P3">Basic networking concepts</text:p>
        </text:list-item>
      </text:list>
      <text:h text:style-name="Heading_20_3" text:outline-level="3"><text:soft-page-break/>Tools (2026)</text:h>
      <text:list text:style-name="L2">
        <text:list-item>
          <text:p text:style-name="P4">Ubuntu 22.04+ or 24.04</text:p>
        </text:list-item>
        <text:list-item>
          <text:p text:style-name="P4">Bash</text:p>
        </text:list-item>
        <text:list-item>
          <text:p text:style-name="P4">systemd</text:p>
        </text:list-item>
        <text:list-item>
          <text:p text:style-name="P4">SSH</text:p>
        </text:list-item>
      </text:list>
      <text:h text:style-name="Heading_20_3" text:outline-level="3">Hands-On</text:h>
      <text:p text:style-name="Text_20_body">✔ Install Linux (WSL, VM, or bare metal)<text:line-break/>✔ Manage users, services, logs<text:line-break/>✔ SSH into a VM</text:p>
      <text:h text:style-name="Heading_20_3" text:outline-level="3">Portfolio Output</text:h>
      <text:p text:style-name="Text_20_body">📁 Repo: <text:span text:style-name="Strong_20_Emphasis">linux-fundamentals</text:span></text:p>
      <text:list text:style-name="L3">
        <text:list-item>
          <text:p text:style-name="P5">Common commands</text:p>
        </text:list-item>
        <text:list-item>
          <text:p text:style-name="P5">Service management</text:p>
        </text:list-item>
        <text:list-item>
          <text:p text:style-name="P5">Troubleshooting notes</text:p>
        </text:list-item>
      </text:list>
      <text:p text:style-name="Horizontal_20_Line"/>
      <text:h text:style-name="Heading_20_1" text:outline-level="1">PHASE 1 — Git, GitHub &amp; Programming (Month 2)</text:h>
      <text:p text:style-name="Text_20_body"><text:span text:style-name="Strong_20_Emphasis">Goal:</text:span> Automate everything and collaborate like a team.</text:p>
      <text:h text:style-name="Heading_20_3" text:outline-level="3">Learn</text:h>
      <text:list text:style-name="L4">
        <text:list-item>
          <text:p text:style-name="P6">Git (branching, PRs, rebasing)</text:p>
        </text:list-item>
        <text:list-item>
          <text:p text:style-name="P6">GitHub workflows</text:p>
        </text:list-item>
        <text:list-item>
          <text:p text:style-name="P6">Python (still #1 for DevOps)</text:p>
        </text:list-item>
        <text:list-item>
          <text:p text:style-name="P6">JSON / YAML</text:p>
        </text:list-item>
      </text:list>
      <text:h text:style-name="Heading_20_3" text:outline-level="3">Tools</text:h>
      <text:list text:style-name="L5">
        <text:list-item>
          <text:p text:style-name="P7">GitHub</text:p>
        </text:list-item>
        <text:list-item>
          <text:p text:style-name="P7">Python 3.12+</text:p>
        </text:list-item>
        <text:list-item>
          <text:p text:style-name="P7">pre-commit hooks</text:p>
        </text:list-item>
      </text:list>
      <text:h text:style-name="Heading_20_3" text:outline-level="3">Hands-On</text:h>
      <text:p text:style-name="Text_20_body">✔ Python scripts:</text:p>
      <text:list text:style-name="L6">
        <text:list-item>
          <text:p text:style-name="P8">Log analyzer</text:p>
        </text:list-item>
        <text:list-item>
          <text:p text:style-name="P8"><text:soft-page-break/>Health check</text:p>
        </text:list-item>
        <text:list-item>
          <text:p text:style-name="P8">API polling<text:line-break/>✔ GitHub PR-based workflow</text:p>
        </text:list-item>
      </text:list>
      <text:h text:style-name="Heading_20_3" text:outline-level="3">Portfolio</text:h>
      <text:p text:style-name="Text_20_body">📁 Repo: <text:span text:style-name="Strong_20_Emphasis">python-for-devops</text:span><text:line-break/>📁 Repo: <text:span text:style-name="Strong_20_Emphasis">git-workflows-demo</text:span></text:p>
      <text:p text:style-name="Horizontal_20_Line"/>
      <text:h text:style-name="Heading_20_1" text:outline-level="1">PHASE 2 — Networking &amp; Web Systems (Month 3)</text:h>
      <text:p text:style-name="Text_20_body"><text:span text:style-name="Strong_20_Emphasis">Goal:</text:span> Understand how production systems actually communicate.</text:p>
      <text:h text:style-name="Heading_20_3" text:outline-level="3">Learn</text:h>
      <text:list text:style-name="L7">
        <text:list-item>
          <text:p text:style-name="P9">TCP/IP, DNS, HTTP/HTTPS</text:p>
        </text:list-item>
        <text:list-item>
          <text:p text:style-name="P9">TLS &amp; certificates (important in 2026)</text:p>
        </text:list-item>
        <text:list-item>
          <text:p text:style-name="P9">Reverse proxies</text:p>
        </text:list-item>
        <text:list-item>
          <text:p text:style-name="P9">Load balancing concepts</text:p>
        </text:list-item>
      </text:list>
      <text:h text:style-name="Heading_20_3" text:outline-level="3">Tools</text:h>
      <text:list text:style-name="L8">
        <text:list-item>
          <text:p text:style-name="P10">Nginx</text:p>
        </text:list-item>
        <text:list-item>
          <text:p text:style-name="P10">curl</text:p>
        </text:list-item>
        <text:list-item>
          <text:p text:style-name="P10">ss / tcpdump (basic)</text:p>
        </text:list-item>
        <text:list-item>
          <text:p text:style-name="P10">Certbot (Let’s Encrypt)</text:p>
        </text:list-item>
      </text:list>
      <text:h text:style-name="Heading_20_3" text:outline-level="3">Hands-On</text:h>
      <text:p text:style-name="Text_20_body">✔ Reverse proxy setup<text:line-break/>✔ HTTPS-enabled web service</text:p>
      <text:h text:style-name="Heading_20_3" text:outline-level="3">Portfolio</text:h>
      <text:p text:style-name="Text_20_body">📁 Repo: <text:span text:style-name="Strong_20_Emphasis">networking-for-devops</text:span></text:p>
      <text:list text:style-name="L9">
        <text:list-item>
          <text:p text:style-name="P11">Architecture diagram (very important)</text:p>
        </text:list-item>
      </text:list>
      <text:p text:style-name="Horizontal_20_Line"/>
      <text:h text:style-name="Heading_20_1" text:outline-level="1">PHASE 3 — Containers (Month 4)</text:h>
      <text:p text:style-name="Text_20_body"><text:span text:style-name="Strong_20_Emphasis">Goal:</text:span> Package applications the modern way.</text:p>
      <text:h text:style-name="Heading_20_3" text:outline-level="3"><text:soft-page-break/>Learn</text:h>
      <text:list text:style-name="L10">
        <text:list-item>
          <text:p text:style-name="P12">Containers vs VMs</text:p>
        </text:list-item>
        <text:list-item>
          <text:p text:style-name="P12">OCI standards</text:p>
        </text:list-item>
        <text:list-item>
          <text:p text:style-name="P12">Image optimization</text:p>
        </text:list-item>
        <text:list-item>
          <text:p text:style-name="P12">Multi-stage builds</text:p>
        </text:list-item>
      </text:list>
      <text:h text:style-name="Heading_20_3" text:outline-level="3">Tools (2026)</text:h>
      <text:list text:style-name="L11">
        <text:list-item>
          <text:p text:style-name="P13">Docker <text:span text:style-name="Strong_20_Emphasis">and</text:span> Podman (know both)</text:p>
        </text:list-item>
        <text:list-item>
          <text:p text:style-name="P13">Docker Compose v2</text:p>
        </text:list-item>
      </text:list>
      <text:h text:style-name="Heading_20_3" text:outline-level="3">Hands-On</text:h>
      <text:p text:style-name="Text_20_body">✔ Containerize:</text:p>
      <text:list text:style-name="L12">
        <text:list-item>
          <text:p text:style-name="P14">Python API</text:p>
        </text:list-item>
        <text:list-item>
          <text:p text:style-name="P14">Nginx frontend</text:p>
        </text:list-item>
        <text:list-item>
          <text:p text:style-name="P14">Multi-service app</text:p>
        </text:list-item>
      </text:list>
      <text:h text:style-name="Heading_20_3" text:outline-level="3">Portfolio</text:h>
      <text:p text:style-name="Text_20_body">📁 Repo: <text:span text:style-name="Strong_20_Emphasis">containerized-apps</text:span></text:p>
      <text:p text:style-name="Horizontal_20_Line"/>
      <text:h text:style-name="Heading_20_1" text:outline-level="1">PHASE 4 — CI/CD (Month 5)</text:h>
      <text:p text:style-name="Text_20_body"><text:span text:style-name="Strong_20_Emphasis">Goal:</text:span> Build real pipelines companies actually use.</text:p>
      <text:h text:style-name="Heading_20_3" text:outline-level="3">Learn</text:h>
      <text:list text:style-name="L13">
        <text:list-item>
          <text:p text:style-name="P15">CI/CD design patterns</text:p>
        </text:list-item>
        <text:list-item>
          <text:p text:style-name="P15">Secrets management</text:p>
        </text:list-item>
        <text:list-item>
          <text:p text:style-name="P15">Environment promotion</text:p>
        </text:list-item>
        <text:list-item>
          <text:p text:style-name="P15">Pipeline debugging</text:p>
        </text:list-item>
      </text:list>
      <text:h text:style-name="Heading_20_3" text:outline-level="3">Tools</text:h>
      <text:list text:style-name="L14">
        <text:list-item>
          <text:p text:style-name="P16">GitHub Actions (primary)</text:p>
        </text:list-item>
        <text:list-item>
          <text:p text:style-name="P16">GitLab CI (secondary)</text:p>
        </text:list-item>
        <text:list-item>
          <text:p text:style-name="P16">Artifact registries</text:p>
        </text:list-item>
      </text:list>
      <text:h text:style-name="Heading_20_3" text:outline-level="3">Hands-On</text:h>
      <text:p text:style-name="Text_20_body">✔ Pipeline that:</text:p>
      <text:list text:style-name="L15">
        <text:list-item>
          <text:p text:style-name="P17"><text:soft-page-break/>Lints code</text:p>
        </text:list-item>
        <text:list-item>
          <text:p text:style-name="P17">Runs tests</text:p>
        </text:list-item>
        <text:list-item>
          <text:p text:style-name="P17">Builds image</text:p>
        </text:list-item>
        <text:list-item>
          <text:p text:style-name="P17">Scans security</text:p>
        </text:list-item>
        <text:list-item>
          <text:p text:style-name="P17">Pushes artifact</text:p>
        </text:list-item>
      </text:list>
      <text:h text:style-name="Heading_20_3" text:outline-level="3">Portfolio</text:h>
      <text:p text:style-name="Text_20_body">📁 Repo: <text:span text:style-name="Strong_20_Emphasis">ci-cd-pipelines</text:span><text:line-break/>✔ Pipeline badge visible</text:p>
      <text:p text:style-name="Horizontal_20_Line"/>
      <text:h text:style-name="Heading_20_1" text:outline-level="1">PHASE 5 — Cloud Fundamentals (Month 6)</text:h>
      <text:p text:style-name="Text_20_body"><text:span text:style-name="Strong_20_Emphasis">Goal:</text:span> Deploy real workloads to the cloud.</text:p>
      <text:h text:style-name="Heading_20_3" text:outline-level="3">Cloud Choice (Pick ONE)</text:h>
      <text:p text:style-name="Text_20_body">✅ <text:span text:style-name="Strong_20_Emphasis">AWS (still dominant in 2026)</text:span><text:line-break/>( Azure/GCP later if needed )</text:p>
      <text:h text:style-name="Heading_20_3" text:outline-level="3">Learn</text:h>
      <text:list text:style-name="L16">
        <text:list-item>
          <text:p text:style-name="P18">IAM (critical)</text:p>
        </text:list-item>
        <text:list-item>
          <text:p text:style-name="P18">Compute, storage, networking</text:p>
        </text:list-item>
        <text:list-item>
          <text:p text:style-name="P18">Security groups &amp; firewalls</text:p>
        </text:list-item>
        <text:list-item>
          <text:p text:style-name="P18">Cost basics (new expectation)</text:p>
        </text:list-item>
      </text:list>
      <text:h text:style-name="Heading_20_3" text:outline-level="3">Tools</text:h>
      <text:list text:style-name="L17">
        <text:list-item>
          <text:p text:style-name="P19">AWS EC2</text:p>
        </text:list-item>
        <text:list-item>
          <text:p text:style-name="P19">S3</text:p>
        </text:list-item>
        <text:list-item>
          <text:p text:style-name="P19">IAM</text:p>
        </text:list-item>
        <text:list-item>
          <text:p text:style-name="P19">VPC</text:p>
        </text:list-item>
      </text:list>
      <text:h text:style-name="Heading_20_3" text:outline-level="3">Hands-On</text:h>
      <text:p text:style-name="Text_20_body">✔ Deploy Docker app on EC2<text:line-break/>✔ Secure access &amp; networking</text:p>
      <text:h text:style-name="Heading_20_3" text:outline-level="3">Portfolio</text:h>
      <text:p text:style-name="Text_20_body">📁 Repo: <text:span text:style-name="Strong_20_Emphasis">aws-cloud-basics</text:span></text:p>
      <text:p text:style-name="Horizontal_20_Line"/>
      <text:h text:style-name="Heading_20_1" text:outline-level="1"><text:soft-page-break/>PHASE 6 — Infrastructure as Code (Month 7)</text:h>
      <text:p text:style-name="Text_20_body"><text:span text:style-name="Strong_20_Emphasis">Goal:</text:span> Infrastructure = code (but updated).</text:p>
      <text:h text:style-name="Heading_20_3" text:outline-level="3">Learn</text:h>
      <text:list text:style-name="L18">
        <text:list-item>
          <text:p text:style-name="P20">Declarative infra</text:p>
        </text:list-item>
        <text:list-item>
          <text:p text:style-name="P20">State management</text:p>
        </text:list-item>
        <text:list-item>
          <text:p text:style-name="P20">Modules &amp; environments</text:p>
        </text:list-item>
      </text:list>
      <text:h text:style-name="Heading_20_3" text:outline-level="3">Tools (2026 Update)</text:h>
      <text:p text:style-name="Text_20_body">✅ <text:span text:style-name="Strong_20_Emphasis">OpenTofu (preferred)</text:span><text:line-break/>⚠ Terraform (still useful, but optional)</text:p>
      <text:list text:style-name="L19">
        <text:list-item>
          <text:p text:style-name="P21">AWS provider</text:p>
        </text:list-item>
      </text:list>
      <text:h text:style-name="Heading_20_3" text:outline-level="3">Hands-On</text:h>
      <text:p text:style-name="Text_20_body">✔ IaC project:</text:p>
      <text:list text:style-name="L20">
        <text:list-item>
          <text:p text:style-name="P22">VPC</text:p>
        </text:list-item>
        <text:list-item>
          <text:p text:style-name="P22">EC2</text:p>
        </text:list-item>
        <text:list-item>
          <text:p text:style-name="P22">IAM roles</text:p>
        </text:list-item>
      </text:list>
      <text:h text:style-name="Heading_20_3" text:outline-level="3">Portfolio</text:h>
      <text:p text:style-name="Text_20_body">📁 Repo: <text:span text:style-name="Strong_20_Emphasis">iac-with-opentofu</text:span></text:p>
      <text:p text:style-name="Horizontal_20_Line"/>
      <text:h text:style-name="Heading_20_1" text:outline-level="1">PHASE 7 — Kubernetes &amp; Platform Basics (Month 8–9)</text:h>
      <text:p text:style-name="Text_20_body"><text:span text:style-name="Strong_20_Emphasis">Goal:</text:span> This is where juniors become hireable.</text:p>
      <text:h text:style-name="Heading_20_3" text:outline-level="3">Learn</text:h>
      <text:list text:style-name="L21">
        <text:list-item>
          <text:p text:style-name="P23">Kubernetes core objects</text:p>
        </text:list-item>
        <text:list-item>
          <text:p text:style-name="P23">Deployments, Services, Ingress</text:p>
        </text:list-item>
        <text:list-item>
          <text:p text:style-name="P23">ConfigMaps &amp; Secrets</text:p>
        </text:list-item>
        <text:list-item>
          <text:p text:style-name="P23">Autoscaling</text:p>
        </text:list-item>
        <text:list-item>
          <text:p text:style-name="P23">Helm basics</text:p>
        </text:list-item>
      </text:list>
      <text:h text:style-name="Heading_20_3" text:outline-level="3">Tools</text:h>
      <text:list text:style-name="L22">
        <text:list-item>
          <text:p text:style-name="P24">Kubernetes</text:p>
        </text:list-item>
        <text:list-item>
          <text:p text:style-name="P24"><text:soft-page-break/>kubectl</text:p>
        </text:list-item>
        <text:list-item>
          <text:p text:style-name="P24">Helm</text:p>
        </text:list-item>
        <text:list-item>
          <text:p text:style-name="P24">Kind or Minikube</text:p>
        </text:list-item>
      </text:list>
      <text:h text:style-name="Heading_20_3" text:outline-level="3">Hands-On</text:h>
      <text:p text:style-name="Text_20_body">✔ Deploy microservices<text:line-break/>✔ Rolling updates<text:line-break/>✔ Horizontal scaling</text:p>
      <text:h text:style-name="Heading_20_3" text:outline-level="3">Portfolio</text:h>
      <text:p text:style-name="Text_20_body">📁 Repo: <text:span text:style-name="Strong_20_Emphasis">kubernetes-platform</text:span></text:p>
      <text:p text:style-name="Horizontal_20_Line"/>
      <text:h text:style-name="Heading_20_1" text:outline-level="1">PHASE 8 — DevSecOps, Monitoring &amp; Reliability (Month 10)</text:h>
      <text:p text:style-name="Text_20_body"><text:span text:style-name="Strong_20_Emphasis">Goal:</text:span> Operate production systems safely.</text:p>
      <text:h text:style-name="Heading_20_3" text:outline-level="3">Learn</text:h>
      <text:list text:style-name="L23">
        <text:list-item>
          <text:p text:style-name="P25">Observability (metrics, logs, traces)</text:p>
        </text:list-item>
        <text:list-item>
          <text:p text:style-name="P25">Security scanning</text:p>
        </text:list-item>
        <text:list-item>
          <text:p text:style-name="P25">Least privilege</text:p>
        </text:list-item>
        <text:list-item>
          <text:p text:style-name="P25">Incident basics</text:p>
        </text:list-item>
      </text:list>
      <text:h text:style-name="Heading_20_3" text:outline-level="3">Tools</text:h>
      <text:list text:style-name="L24">
        <text:list-item>
          <text:p text:style-name="P26">Prometheus</text:p>
        </text:list-item>
        <text:list-item>
          <text:p text:style-name="P26">Grafana</text:p>
        </text:list-item>
        <text:list-item>
          <text:p text:style-name="P26">Loki</text:p>
        </text:list-item>
        <text:list-item>
          <text:p text:style-name="P26">Trivy</text:p>
        </text:list-item>
        <text:list-item>
          <text:p text:style-name="P26">Snyk (optional)</text:p>
        </text:list-item>
      </text:list>
      <text:h text:style-name="Heading_20_3" text:outline-level="3">Hands-On</text:h>
      <text:p text:style-name="Text_20_body">✔ Dashboards<text:line-break/>✔ Alert rules<text:line-break/>✔ Image vulnerability scans</text:p>
      <text:h text:style-name="Heading_20_3" text:outline-level="3">Portfolio</text:h>
      <text:p text:style-name="Text_20_body">📁 Repo: <text:span text:style-name="Strong_20_Emphasis">observability-and-security</text:span></text:p>
      <text:p text:style-name="Horizontal_20_Line"/>
      <text:h text:style-name="Heading_20_1" text:outline-level="1"><text:soft-page-break/>🚀 FINAL PROJECT (Month 11–12)</text:h>
      <text:p text:style-name="Text_20_body"><text:span text:style-name="Strong_20_Emphasis">This replaces certificates.</text:span></text:p>
      <text:h text:style-name="Heading_20_2" text:outline-level="2">Project:</text:h>
      <text:h text:style-name="Heading_20_3" text:outline-level="3"><text:span text:style-name="Strong_20_Emphasis">Production-Ready Cloud Platform (2026 Standard)</text:span></text:h>
      <text:p text:style-name="Text_20_body">Includes:<text:line-break/>✔ Python app<text:line-break/>✔ Containerized services<text:line-break/>✔ CI/CD pipeline<text:line-break/>✔ OpenTofu infrastructure<text:line-break/>✔ Kubernetes deployment<text:line-break/>✔ Monitoring &amp; alerts<text:line-break/>✔ Security scans</text:p>
      <text:h text:style-name="Heading_20_3" text:outline-level="3">What Hiring Managers Look For</text:h>
      <text:list text:style-name="L25">
        <text:list-item>
          <text:p text:style-name="P27">Clear READMEs</text:p>
        </text:list-item>
        <text:list-item>
          <text:p text:style-name="P27">Architecture diagram</text:p>
        </text:list-item>
        <text:list-item>
          <text:p text:style-name="P27">Trade-off explanations</text:p>
        </text:list-item>
        <text:list-item>
          <text:p text:style-name="P27">Troubleshooting notes</text:p>
        </text:list-item>
      </text:list>
      <text:p text:style-name="Text_20_body">📁 GitHub Organization (multiple repos)</text:p>
      <text:p text:style-name="Horizontal_20_Line"/>
      <text:h text:style-name="Heading_20_1" text:outline-level="1">✅ You Are Junior DevOps-Ready When You Can:</text:h>
      <text:p text:style-name="Text_20_body">✔ Explain infra choices<text:line-break/>✔ Debug failed pipelines<text:line-break/>✔ Deploy &amp; roll back apps<text:line-break/>✔ Read Kubernetes manifests<text:line-break/>✔ Secure cloud resources<text:line-break/>✔ Show <text:span text:style-name="Strong_20_Emphasis">real projects</text:span>, not tutorials</text:p>
      <text:p text:style-name="Horizontal_20_Line"/>
      <text:h text:style-name="Heading_20_1" text:outline-level="1">🎓 Certifications (Optional, 2026-Relevant)</text:h>
      <text:list text:style-name="L26">
        <text:list-item>
          <text:p text:style-name="P28">AWS Cloud Practitioner (starter)</text:p>
        </text:list-item>
        <text:list-item>
          <text:p text:style-name="P28">AWS Solutions Architect Associate</text:p>
        </text:list-item>
        <text:list-item>
          <text:p text:style-name="P28">CKAD (still respected)</text:p>
        </text:list-item>
      </text:list>
      <text:p text:style-name="Horizontal_20_Line"><text:soft-page-break/></text:p>
      <text:h text:style-name="Heading_20_2" text:outline-level="2">Want the Next Level?</text:h>
      <text:p text:style-name="Text_20_body">I can:</text:p>
      <text:list text:style-name="L27">
        <text:list-item>
          <text:p text:style-name="P29">Turn this into a <text:span text:style-name="Strong_20_Emphasis">weekly schedule</text:span></text:p>
        </text:list-item>
        <text:list-item>
          <text:p text:style-name="P29">Build <text:span text:style-name="Strong_20_Emphasis">exact portfolio projects step-by-step</text:span></text:p>
        </text:list-item>
        <text:list-item>
          <text:p text:style-name="P29">Create a <text:span text:style-name="Strong_20_Emphasis">job-ready GitHub structure</text:span></text:p>
        </text:list-item>
        <text:list-item>
          <text:p text:style-name="P29">Help you <text:span text:style-name="Strong_20_Emphasis">transition to Platform Engineering</text:span></text:p>
        </text:list-item>
      </text:list>
      <text:p text:style-name="Text_20_body">👉 Tell me:<text:line-break/><text:span text:style-name="Strong_20_Emphasis">How many hours/week can you study, and are you aiming for local or remote jobs?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09:59:37.424626606</meta:creation-date>
    <meta:editing-duration>PT43S</meta:editing-duration>
    <meta:editing-cycles>2</meta:editing-cycles>
    <meta:generator>LibreOffice/24.2.7.2$Linux_X86_64 LibreOffice_project/420$Build-2</meta:generator>
    <dc:date>2026-01-24T10:00:18.736599544</dc:date>
    <meta:document-statistic meta:table-count="0" meta:image-count="0" meta:object-count="0" meta:page-count="9" meta:paragraph-count="193" meta:word-count="885" meta:character-count="5292" meta:non-whitespace-character-count="4689"/>
  </office:meta>
</office:document-meta>
</file>